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81])" office:value-type="float" office:value="119.6" calcext:value-type="float">
            <text:p>119,6</text:p>
          </table:table-cell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]*[.E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8.5" calcext:value-type="float">
            <text:p>8,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7]*[.E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6.5" calcext:value-type="float">
            <text:p>6,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10]*[.E10]"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[.C11]*[.E1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8.75" calcext:value-type="float">
            <text:p>8,7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4]*[.E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comanie</text:p>
          </table:table-cell>
          <table:table-cell office:value-type="float" office:value="5.5" calcext:value-type="float">
            <text:p>5,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C15]*[.E15]"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ngle morning</text:p>
          </table:table-cell>
          <table:table-cell office:value-type="float" office:value="6.5" calcext:value-type="float">
            <text:p>6,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17]*[.E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19]*[.E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4.75" calcext:value-type="float">
            <text:p>4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6.5" calcext:value-type="float">
            <text:p>6,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3]*[.E23]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]*[.E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25]*[.E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.5" calcext:value-type="float">
            <text:p>10,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g Escape</text:p>
          </table:table-cell>
          <table:table-cell office:value-type="float" office:value="3.75" calcext:value-type="float">
            <text:p>3,7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[.C27]*[.E27]" office:value-type="float" office:value="3.75" calcext:value-type="float">
            <text:p>3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.5" calcext:value-type="float">
            <text:p>7,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8]*[.E28]"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4.5" calcext:value-type="float">
            <text:p>4,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29]*[.E29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.5" calcext:value-type="float">
            <text:p>5,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30]*[.E30]"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 wafa</text:p>
          </table:table-cell>
          <table:table-cell office:value-type="float" office:value="3.3" calcext:value-type="float">
            <text:p>3,3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[.C32]*[.E32]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chipel</text:p>
          </table:table-cell>
          <table:table-cell office:value-type="float" office:value="6.5" calcext:value-type="float">
            <text:p>6,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C34]*[.E34]"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dibaba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]*[.E3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lfa libre</text:p>
          </table:table-cell>
          <table:table-cell office:value-type="float" office:value="6" calcext:value-type="float">
            <text:p>6</text:p>
          </table:table-cell>
          <table:table-cell office:value-type="float" office:value="80.13" calcext:value-type="float">
            <text:p>80,13</text:p>
          </table:table-cell>
          <table:table-cell office:value-type="float" office:value="1" calcext:value-type="float">
            <text:p>1</text:p>
          </table:table-cell>
          <table:table-cell table:formula="of:=[.C36]*[.E3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xi zulu</text:p>
          </table:table-cell>
          <table:table-cell office:value-type="float" office:value="6.5" calcext:value-type="float">
            <text:p>6,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37]*[.E37]"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dillera</text:p>
          </table:table-cell>
          <table:table-cell office:value-type="float" office:value="6.8" calcext:value-type="float">
            <text:p>6,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8]*[.E38]" office:value-type="float" office:value="6.8" calcext:value-type="float">
            <text:p>6,8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azoum </text:p>
          </table:table-cell>
          <table:table-cell office:value-type="float" office:value="4.5" calcext:value-type="float">
            <text:p>4,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omanie</text:p>
          </table:table-cell>
          <table:table-cell office:value-type="float" office:value="5.5" calcext:value-type="float">
            <text:p>5,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g Escape</text:p>
          </table:table-cell>
          <table:table-cell office:value-type="float" office:value="3.75" calcext:value-type="float">
            <text:p>3,7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.5" calcext:value-type="float">
            <text:p>7,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4.5" calcext:value-type="float">
            <text:p>4,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.5" calcext:value-type="float">
            <text:p>5,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 wafa</text:p>
          </table:table-cell>
          <table:table-cell office:value-type="float" office:value="3.3" calcext:value-type="float">
            <text:p>3,3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2]*[.E6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3]*[.E6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4]*[.E6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5]*[.E6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6]*[.E6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7]*[.E6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8]*[.E6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9]*[.E6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0]*[.E6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1]*[.E6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2]*[.E6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3]*[.E6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4]*[.E6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5]*[.E6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6]*[.E6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7]*[.E6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8]*[.E6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9]*[.E6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0]*[.E650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19">00/00/0000</text:date>, <text:time style:data-style-name="N2" text:time-value="19:51:02.805654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6-05-19T22:20:30.805855965</dc:date>
    <meta:editing-duration>P10DT4H58M5S</meta:editing-duration>
    <meta:editing-cycles>24</meta:editing-cycles>
    <meta:generator>LibreOffice/5.1.6.2$Linux_X86_64 LibreOffice_project/10m0$Build-2</meta:generator>
    <meta:document-statistic meta:table-count="1" meta:cell-count="976" meta:object-count="0"/>
  </office:meta>
</office:document-meta>
</file>